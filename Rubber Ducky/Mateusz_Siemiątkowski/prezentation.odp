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20000000200E486B10D.png" manifest:media-type="image/png"/>
  <manifest:file-entry manifest:full-path="Pictures/1000000100000800000005A8B619A1D9.png" manifest:media-type="image/png"/>
  <manifest:file-entry manifest:full-path="Media/demonstration.avi" manifest:media-type="video/x-msvideo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Mono" svg:font-family="'Space Mono'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TITL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-title" style:list-style-name="L3">
      <style:graphic-properties draw:stroke="none" svg:stroke-width="0cm" draw:fill="none" draw:textarea-horizontal-align="left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-title" style:list-style-name="L3">
      <style:graphic-properties draw:stroke="none" svg:stroke-width="0cm" draw:fill="none" draw:textarea-horizontal-align="left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-title" style:list-style-name="L3">
      <style:graphic-properties draw:stroke="none" svg:stroke-width="0cm" draw:fill="none" draw:textarea-horizontal-align="left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-title" style:list-style-name="L3">
      <style:graphic-properties draw:stroke="none" svg:stroke-width="0cm" draw:fill="none" draw:textarea-horizontal-align="left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-title" style:list-style-name="L3">
      <style:graphic-properties draw:stroke="none" svg:stroke-width="0cm" draw:fill="none" draw:textarea-horizontal-align="left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Space Mono" fo:font-size="44pt" fo:letter-spacing="normal" fo:language="en" fo:country="GB" fo:font-style="normal" style:text-underline-style="none" fo:font-weight="normal" style:font-name-asian="Space Mono" style:font-size-asian="44pt" style:font-style-asian="normal" style:font-weight-asian="normal" style:font-name-complex="Space Mono" style:font-size-complex="44pt" style:font-style-complex="normal" style:font-weight-complex="normal"/>
    </style:style>
    <style:style style:name="P3" style:family="paragraph">
      <style:paragraph-properties fo:margin-left="1.27cm" fo:margin-right="0cm" fo:margin-top="0cm" fo:margin-bottom="0cm" fo:line-height="100%" fo:text-align="center" fo:text-indent="-0.952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adadad" loext:opacity="100%" style:text-line-through-style="none" style:text-line-through-type="none" style:text-position="0% 100%" style:font-name="Space Mono" fo:font-size="23.1000003814697pt" fo:letter-spacing="normal" fo:language="en" fo:country="GB" fo:font-style="normal" style:text-underline-style="none" fo:font-weight="normal" style:font-name-asian="Space Mono" style:font-size-asian="21pt" style:font-style-asian="normal" style:font-weight-asian="normal" style:font-name-complex="Space Mono" style:font-size-complex="2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 fo:language="en" fo:country="G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Space Mono" fo:font-size="23.1000003814697pt" fo:letter-spacing="normal" fo:language="en" fo:country="GB" fo:font-style="normal" style:text-underline-style="none" fo:font-weight="normal" style:font-name-asian="Space Mono" style:font-size-asian="23.1000003814697pt" style:font-style-asian="normal" style:font-weight-asian="normal" style:font-name-complex="Space Mono" style:font-size-complex="23.1000003814697pt" style:font-style-complex="normal" style:font-weight-complex="normal"/>
    </style:style>
    <style:style style:name="T1" style:family="text">
      <style:text-properties fo:color="#ffffff" loext:opacity="100%" style:font-name="Space Mono" fo:font-size="44pt" fo:language="en" fo:country="GB" style:font-size-asian="44pt" style:font-size-complex="44pt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Space Mono" fo:font-size="23.1000003814697pt" fo:letter-spacing="normal" fo:language="en" fo:country="GB" fo:font-style="normal" style:text-underline-style="none" fo:font-weight="normal" style:font-name-asian="Space Mono" style:font-size-asian="21pt" style:font-style-asian="normal" style:font-weight-asian="normal" style:font-name-complex="Space Mono" style:font-size-complex="21pt" style:font-style-complex="normal" style:font-weight-complex="normal"/>
    </style:style>
    <style:style style:name="T3" style:family="text">
      <style:text-properties fo:color="#ffffff" loext:opacity="100%" style:font-name="Space Mono" fo:font-size="23.1000003814697pt" fo:language="en" fo:country="GB" fo:font-weight="bold" style:font-size-asian="23.1000003814697pt" style:font-weight-asian="bold" style:font-size-complex="23.1000003814697pt" style:font-weight-complex="bold"/>
    </style:style>
    <style:style style:name="T4" style:family="text">
      <style:text-properties fo:color="#ffffff" loext:opacity="100%" style:font-name="Space Mono" fo:font-size="23.1000003814697pt" fo:language="en" fo:country="GB" style:font-size-asian="23.1000003814697pt" style:font-size-complex="23.1000003814697pt"/>
    </style:style>
    <style:style style:name="T5" style:family="text">
      <style:text-properties fo:color="#ffffff" loext:opacity="100%" style:font-name="Space Mono" fo:font-size="23.1000003814697pt" fo:language="en" fo:country="GB" fo:font-weight="normal" style:font-size-asian="23.1000003814697pt" style:font-weight-asian="normal" style:font-size-complex="23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178;p 10" presentation:style-name="pr1" draw:text-style-name="P2" draw:layer="layout" svg:width="13.044cm" svg:height="6.284cm" svg:x="14cm" svg:y="2.279cm" presentation:class="title" presentation:user-transformed="true">
          <draw:text-box>
            <text:p text:style-name="P1"><text:span text:style-name="T1">Scripts for Hack5 tools</text:span></text:p>
          </draw:text-box>
        </draw:frame>
        <draw:frame draw:name="Google Shape;4179;p 6" presentation:style-name="pr2" draw:text-style-name="P4" draw:layer="layout" svg:width="26.09cm" svg:height="2.426cm" svg:x="0.954cm" svg:y="8.678cm" presentation:class="subtitl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frame draw:name="Google Shape;33;p 2" draw:style-name="gr1" draw:text-style-name="P5" draw:layer="layout" svg:width="21.615cm" svg:height="15.282cm" svg:x="-4.057cm" svg:y="0.233cm">
          <draw:image xlink:href="Pictures/1000000100000800000005A8B619A1D9.png" xlink:type="simple" xlink:show="embed" xlink:actuate="onLoad" draw:mime-type="image/png">
            <text:p/>
          </draw:image>
        </draw:frame>
        <presentation:notes draw:style-name="dp1">
          <draw:page-thumbnail draw:name="Google Shape;4175;p17:notes 10" draw:style-name="gr2" draw:layer="layout" svg:width="18.665cm" svg:height="11.136cm" svg:x="1.167cm" svg:y="2.227cm" draw:page-number="1" presentation:class="page"/>
          <draw:frame draw:name="Google Shape;4176;p17:notes 11"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4178;p 1" presentation:style-name="pr4" draw:text-style-name="P2" draw:layer="layout" svg:width="26.09cm" svg:height="6.284cm" svg:x="0.954cm" svg:y="2.279cm" presentation:class="title" presentation:user-transformed="true">
          <draw:text-box>
            <text:p text:style-name="P1"><text:span text:style-name="T1">About device</text:span></text:p>
          </draw:text-box>
        </draw:frame>
        <draw:frame draw:name="Google Shape;4179;p 3" presentation:style-name="pr5" draw:text-style-name="P4" draw:layer="layout" svg:width="26.09cm" svg:height="2.426cm" svg:x="0.954cm" svg:y="8.678cm" presentation:class="subtitle" presentation:user-transformed="true">
          <draw:text-box>
            <text:p text:style-name="P3"><text:span text:style-name="T2">USB Rubber Ducky</text:span></text:p>
          </draw:text-box>
        </draw:frame>
        <presentation:notes draw:style-name="dp1">
          <draw:page-thumbnail draw:name="Google Shape;4175;p17:notes 1" draw:style-name="gr2" draw:layer="layout" svg:width="18.665cm" svg:height="11.136cm" svg:x="1.167cm" svg:y="2.227cm" draw:page-number="2" presentation:class="page"/>
          <draw:frame draw:name="Google Shape;4176;p17:notes 3"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4178;p 2" presentation:style-name="pr7" draw:text-style-name="P8" draw:layer="layout" svg:width="26.09cm" svg:height="10.721cm" svg:x="0.954cm" svg:y="2.279cm" presentation:class="title" presentation:user-transformed="true">
          <draw:text-box>
            <text:p text:style-name="P7"><text:span text:style-name="T3">USB Rubber Ducky</text:span><text:span text:style-name="T4"> is a popular hacking tool developed by Hack5. Designed to appear as a harmless USB flash drive, in reality functions as a </text:span><text:span text:style-name="T3">Human Interface Device</text:span><text:span text:style-name="T4"> (HID).</text:span><text:span text:style-name="T4"><text:line-break/></text:span><text:span text:style-name="T4">By tricking the computer to recognise it as a keyboard, it allows for rapid keystroke injection attacks, or automation of mundane repetitive tasks.</text:span></text:p>
          </draw:text-box>
        </draw:frame>
        <presentation:notes draw:style-name="dp2">
          <draw:page-thumbnail draw:name="Google Shape;4175;p17:notes 2" draw:style-name="gr2" draw:layer="layout" svg:width="18.665cm" svg:height="11.136cm" svg:x="1.167cm" svg:y="2.227cm" draw:page-number="3" presentation:class="page"/>
          <draw:frame draw:name="Google Shape;4176;p17:notes 4"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4178;p 3" presentation:style-name="pr9" draw:text-style-name="P2" draw:layer="layout" svg:width="26.09cm" svg:height="6.284cm" svg:x="0.954cm" svg:y="2.279cm" presentation:class="title" presentation:user-transformed="true">
          <draw:text-box>
            <text:p text:style-name="P1"><text:span text:style-name="T1">About script</text:span></text:p>
          </draw:text-box>
        </draw:frame>
        <draw:frame draw:name="Google Shape;4179;p 2" presentation:style-name="pr10" draw:text-style-name="P4" draw:layer="layout" svg:width="26.09cm" svg:height="2.426cm" svg:x="0.954cm" svg:y="8.678cm" presentation:class="subtitle" presentation:user-transformed="true">
          <draw:text-box>
            <text:p text:style-name="P3"><text:span text:style-name="T2">Stealing files using USB Rubber Ducky</text:span></text:p>
          </draw:text-box>
        </draw:frame>
        <presentation:notes draw:style-name="dp2">
          <draw:page-thumbnail draw:name="Google Shape;4175;p17:notes 3" draw:style-name="gr2" draw:layer="layout" svg:width="18.665cm" svg:height="11.136cm" svg:x="1.167cm" svg:y="2.227cm" draw:page-number="4" presentation:class="page"/>
          <draw:frame draw:name="Google Shape;4176;p17:notes 2" presentation:style-name="pr1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4178;p 4" presentation:style-name="pr12" draw:text-style-name="P8" draw:layer="layout" svg:width="26.09cm" svg:height="10.721cm" svg:x="0.954cm" svg:y="2.279cm" presentation:class="title" presentation:user-transformed="true">
          <draw:text-box>
            <text:p text:style-name="P7"><text:span text:style-name="T4">The script targets machines using Windows operating system.</text:span><text:span text:style-name="T4"><text:line-break/></text:span><text:span text:style-name="T4"><text:line-break/></text:span><text:span text:style-name="T4">The main feature of the script is stealthily <text:s/>copying encrypted pdf files from selected directory onto the USB Rubber Ducky.</text:span><text:span text:style-name="T4"><text:line-break/></text:span><text:span text:style-name="T4"><text:line-break/></text:span><text:span text:style-name="T4">There are three components:</text:span><text:span text:style-name="T4"><text:line-break/></text:span><text:span text:style-name="T4">- payload.txt (DuckyScript)</text:span><text:span text:style-name="T4"><text:line-break/></text:span><text:span text:style-name="T4">- payload.ps1 (powershell script)</text:span><text:span text:style-name="T4"><text:line-break/></text:span><text:span text:style-name="T4">- target.txt</text:span><text:span text:style-name="T4"><text:line-break/></text:span><text:span text:style-name="T4"> </text:span></text:p>
          </draw:text-box>
        </draw:frame>
        <presentation:notes draw:style-name="dp2">
          <draw:page-thumbnail draw:name="Google Shape;4175;p17:notes 4" draw:style-name="gr2" draw:layer="layout" svg:width="18.665cm" svg:height="11.136cm" svg:x="1.167cm" svg:y="2.227cm" draw:page-number="5" presentation:class="page"/>
          <draw:frame draw:name="Google Shape;4176;p17:notes 5"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4178;p 6" presentation:style-name="pr14" draw:text-style-name="P8" draw:layer="layout" svg:width="26.09cm" svg:height="10.721cm" svg:x="0.954cm" svg:y="2.279cm" presentation:class="title" presentation:user-transformed="true">
          <draw:text-box>
            <text:p text:style-name="P7"><text:span text:style-name="T4">1. Preparation</text:span><text:span text:style-name="T4"><text:line-break/></text:span><text:span text:style-name="T4">When you plug in USB Rubber Ducky it starts as normal storage device. You can now specify the target directory using </text:span><text:span text:style-name="T3">target.txt</text:span><text:span text:style-name="T4"> file. If there is no such file or path inside the file is invalid the script will target </text:span><text:span text:style-name="T3">Downloads</text:span><text:span text:style-name="T4"> directory of the active user.</text:span><text:span text:style-name="T4"><text:line-break/></text:span><text:span text:style-name="T4">To start the script you need to push the button underneath the Rubber Ducky case.</text:span></text:p>
          </draw:text-box>
        </draw:frame>
        <presentation:notes draw:style-name="dp2">
          <draw:page-thumbnail draw:name="Google Shape;4175;p17:notes 6" draw:style-name="gr2" draw:layer="layout" svg:width="18.665cm" svg:height="11.136cm" svg:x="1.167cm" svg:y="2.227cm" draw:page-number="6" presentation:class="page"/>
          <draw:frame draw:name="Google Shape;4176;p17:notes 7" presentation:style-name="pr1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4178;p 7" presentation:style-name="pr16" draw:text-style-name="P8" draw:layer="layout" svg:width="26.09cm" svg:height="10.721cm" svg:x="0.954cm" svg:y="2.279cm" presentation:class="title" presentation:user-transformed="true">
          <draw:text-box>
            <text:p text:style-name="P7"><text:span text:style-name="T4">2. Execution</text:span><text:span text:style-name="T4"><text:line-break/></text:span><text:span text:style-name="T4">Upon activation Rubber Ducky will open run window, start powershell in the background and load previously prepared </text:span><text:span text:style-name="T3">payload.ps1</text:span><text:span text:style-name="T5">.</text:span><text:span text:style-name="T3"> </text:span><text:span text:style-name="T5">Firstly the script will create a directory on the Rubber Ducky with the name of the machine. Secondly it will look for encrypted pdf files within the target directory and copy them into previously prepared directory.</text:span></text:p>
          </draw:text-box>
        </draw:frame>
        <presentation:notes draw:style-name="dp2">
          <draw:page-thumbnail draw:name="Google Shape;4175;p17:notes 7" draw:style-name="gr2" draw:layer="layout" svg:width="18.665cm" svg:height="11.136cm" svg:x="1.167cm" svg:y="2.227cm" draw:page-number="7" presentation:class="page"/>
          <draw:frame draw:name="Google Shape;4176;p17:notes 8" presentation:style-name="pr1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4178;p 8" presentation:style-name="pr18" draw:text-style-name="P8" draw:layer="layout" svg:width="26.09cm" svg:height="10.721cm" svg:x="0.954cm" svg:y="2.279cm" presentation:class="title" presentation:user-transformed="true">
          <draw:text-box>
            <text:p text:style-name="P7"><text:span text:style-name="T4">3. Clean-up</text:span><text:span text:style-name="T4"><text:line-break/></text:span><text:span text:style-name="T4">The script will erase the history of recently accessed files and programs open through run window.</text:span><text:span text:style-name="T4"><text:line-break/></text:span><text:span text:style-name="T4"><text:line-break/></text:span><text:span text:style-name="T4">When everything is done it will turn </text:span><text:span text:style-name="T3">CAPSLOCK</text:span><text:span text:style-name="T4"> key on and off three times to signal that you can safely remove Rubber Ducky. </text:span></text:p>
          </draw:text-box>
        </draw:frame>
        <presentation:notes draw:style-name="dp2">
          <draw:page-thumbnail draw:name="Google Shape;4175;p17:notes 8" draw:style-name="gr2" draw:layer="layout" svg:width="18.665cm" svg:height="11.136cm" svg:x="1.167cm" svg:y="2.227cm" draw:page-number="8" presentation:class="page"/>
          <draw:frame draw:name="Google Shape;4176;p17:notes 9" presentation:style-name="pr19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draw:name="Google Shape;4178;p 5" presentation:style-name="pr20" draw:text-style-name="P2" draw:layer="layout" svg:width="26.09cm" svg:height="6.284cm" svg:x="0.954cm" svg:y="2.279cm" presentation:class="title" presentation:user-transformed="true">
          <draw:text-box>
            <text:p text:style-name="P1"><text:span text:style-name="T1">Demonstration</text:span></text:p>
          </draw:text-box>
        </draw:frame>
        <draw:frame draw:name="Google Shape;4179;p 4" presentation:style-name="pr21" draw:text-style-name="P4" draw:layer="layout" svg:width="26.09cm" svg:height="2.426cm" svg:x="0.954cm" svg:y="8.678cm" presentation:class="subtitle" presentation:placeholder="true" presentation:user-transformed="true">
          <draw:text-box/>
        </draw:frame>
        <presentation:notes draw:style-name="dp2">
          <draw:page-thumbnail draw:name="Google Shape;4175;p17:notes 5" draw:style-name="gr2" draw:layer="layout" svg:width="18.665cm" svg:height="11.136cm" svg:x="1.167cm" svg:y="2.227cm" draw:page-number="9" presentation:class="page"/>
          <draw:frame draw:name="Google Shape;4176;p17:notes 6" presentation:style-name="pr2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4178;p 9" presentation:style-name="pr23" draw:text-style-name="P2" draw:layer="layout" svg:width="26.09cm" svg:height="6.284cm" svg:x="0.954cm" svg:y="2.279cm" presentation:class="title" presentation:user-transformed="true">
          <draw:text-box>
            <text:p text:style-name="P1"><text:span text:style-name="T1">Demonstration</text:span></text:p>
          </draw:text-box>
        </draw:frame>
        <draw:frame draw:name="Google Shape;4179;p 5" presentation:style-name="pr24" draw:text-style-name="P4" draw:layer="layout" svg:width="26.09cm" svg:height="2.426cm" svg:x="0.954cm" svg:y="8.678cm" presentation:class="subtitle" presentation:placeholder="true" presentation:user-transformed="true">
          <draw:text-box/>
        </draw:frame>
        <draw:frame draw:name="Media object 1" draw:style-name="gr3" draw:layer="layout" svg:width="24.1cm" svg:height="12.954cm" svg:x="1.9cm" svg:y="1.1cm">
          <draw:plugin xlink:href="Media/demonstration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1">
          <draw:page-thumbnail draw:name="Google Shape;4175;p17:notes 9" draw:style-name="gr2" draw:layer="layout" svg:width="18.665cm" svg:height="11.136cm" svg:x="1.167cm" svg:y="2.227cm" draw:page-number="10" presentation:class="page"/>
          <draw:frame draw:name="Google Shape;4176;p17:notes 10" presentation:style-name="pr2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Mono" svg:font-family="'Space Mono'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8;p1" draw:style-name="Mgr3" draw:text-style-name="MP7" draw:layer="backgroundobjects" svg:width="2.624cm" svg:height="2.624cm" svg:x="25.375cm" svg:y="13.124cm">
        <draw:image xlink:href="Pictures/100000010000020000000200E486B10D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26.09cm" svg:height="6.284cm" svg:x="0.954cm" svg:y="2.279cm" presentation:class="title" presentation:placeholder="true" presentation:user-transformed="true">
        <draw:text-box/>
      </draw:frame>
      <draw:frame draw:name="Google Shape;12;p2" draw:style-name="Mgr3" draw:text-style-name="MP7" draw:layer="backgroundobjects" svg:width="2.624cm" svg:height="2.624cm" svg:x="25.375cm" svg:y="13.124cm">
        <draw:image xlink:href="Pictures/100000010000020000000200E486B10D.png" xlink:type="simple" xlink:show="embed" xlink:actuate="onLoad" draw:mime-type="image/png">
          <text:p/>
        </draw:image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1T11:46:44.845154000</meta:creation-date>
    <dc:date>2026-05-13T21:42:59.396659000</dc:date>
    <meta:editing-duration>P2DT5H44M8S</meta:editing-duration>
    <meta:editing-cycles>5</meta:editing-cycles>
    <meta:generator>LibreOffice/25.8.6.2$Windows_X86_64 LibreOffice_project/b4b39682cd9868fa725bc664aff94278d315bd04</meta:generator>
    <meta:document-statistic meta:object-count="68"/>
  </office:meta>
</office:document-meta>
</file>